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0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4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02">02.12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02">02.12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33</meta:editing-cycles>
    <meta:creation-date>2017-10-20T10:16:41</meta:creation-date>
    <dc:date>2025-12-02T18:45:14.013000000</dc:date>
    <meta:editing-duration>PT21H27M58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
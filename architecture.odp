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11.536cm" fo:min-width="8.53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4.444cm" fo:min-width="8.2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.637cm" fo:min-width="3.60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316cm" fo:min-width="0cm" fo:padding-top="0.125cm" fo:padding-bottom="0.125cm" fo:padding-left="0.25cm" fo:padding-right="0.25cm" fo:wrap-option="wrap"/>
    </style:style>
    <style:style style:name="gr19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.637cm" fo:min-width="3.20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1.549cm" fo:min-width="0cm" fo:padding-top="0.125cm" fo:padding-bottom="0.125cm" fo:padding-left="0.25cm" fo:padding-right="0.25cm" fo:wrap-option="wrap"/>
    </style:style>
    <style:style style:name="gr32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2.762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5.2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13" draw:text-style-name="P11" draw:layer="layout" svg:width="4.2cm" svg:height="0.983cm" svg:x="1.8cm" svg:y="11.417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4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7" draw:text-style-name="P6" draw:layer="layout" svg:width="5.478cm" svg:height="0.719cm" svg:x="10.2cm" svg:y="9.6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8" draw:text-style-name="P6" draw:layer="layout" svg:width="0.001cm" svg:height="0.566cm" svg:x="3.8cm" svg:y="10.851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9" draw:text-style-name="P6" draw:layer="layout" svg:width="2.142cm" svg:height="0.952cm" svg:x="5.258cm" svg:y="14.4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5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4" draw:style-name="gr29" draw:text-style-name="P11" draw:layer="layout" svg:width="3.8cm" svg:height="0.983cm" svg:x="6.4cm" svg:y="11.418cm">
          <text:p text:style-name="P1"><text:span text:style-name="T3">PianoRecord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4" draw:style-name="gr18" draw:text-style-name="P6" draw:layer="layout" svg:width="0.001cm" svg:height="0.566cm" svg:x="8.8cm" svg:y="10.8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0" draw:style-name="gr30" draw:text-style-name="P6" draw:layer="layout" svg:width="0.001cm" svg:height="2cm" svg:x="5.6cm" svg:y="12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0" draw:style-name="gr31" draw:text-style-name="P6" draw:layer="layout" svg:width="0.001cm" svg:height="1.799cm" svg:x="6.799cm" svg:y="12.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4-16">16.04.26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4-16">16.04.26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47</meta:editing-cycles>
    <meta:creation-date>2017-10-20T10:16:41</meta:creation-date>
    <dc:date>2026-04-16T21:27:21.730000000</dc:date>
    <meta:editing-duration>PT22H6M27S</meta:editing-duration>
    <meta:generator>LibreOffice/6.3.1.2$Windows_X86_64 LibreOffice_project/b79626edf0065ac373bd1df5c28bd630b4424273</meta:generator>
    <meta:document-statistic meta:object-count="76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
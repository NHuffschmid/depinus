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2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4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1-02">02.11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1-02">02.11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31</meta:editing-cycles>
    <meta:creation-date>2017-10-20T10:16:41</meta:creation-date>
    <dc:date>2025-11-02T14:01:36.507000000</dc:date>
    <meta:editing-duration>PT21H18M19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
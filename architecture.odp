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51000000247A796D7417C38852.png" manifest:media-type="image/png"/>
  <manifest:file-entry manifest:full-path="Pictures/100002010000048E00000262D8B2E9588D15E69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4f6228" draw:fill="solid" draw:fill-color="#00b05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106cm" svg:stroke-color="#0070c0" draw:fill="solid" draw:fill-color="#0070c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1.047cm" fo:min-width="6.849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06cm" svg:stroke-color="#e46c0a" draw:fill="solid" draw:fill-color="#eefc64" draw:textarea-vertical-align="top" draw:auto-grow-height="false" draw:fit-to-size="false" style:shrink-to-fit="false" fo:min-height="5.639cm" fo:min-width="8.08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41cm" svg:stroke-color="#ff0000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141cm" svg:stroke-color="#d99694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e46c0a" draw:fill="solid" draw:fill-color="#ffff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e46c0a" draw:fill="solid" draw:fill-color="#ffff00" draw:textarea-vertical-align="top" draw:auto-grow-height="false" draw:fit-to-size="false" style:shrink-to-fit="false" fo:min-height="1.061cm" fo:min-width="7.76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41cm" svg:stroke-color="#d99694" draw:marker-end="msArrowEnd_20_5" draw:marker-end-width="0.423cm" draw:marker-end-center="false" draw:fill="none" draw:textarea-vertical-align="top" draw:auto-grow-height="false" fo:min-height="0.802cm" fo:min-width="3.479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3.626cm" fo:min-width="5.377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2.872cm" fo:min-width="5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1.622cm" fo:min-width="5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.469cm" fo:min-width="4.978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115cm" svg:stroke-color="#595959" draw:marker-end="msArrowEnd_20_5" draw:marker-end-width="0.345cm" draw:marker-end-center="false" draw:fill="none" draw:textarea-vertical-align="top" draw:auto-grow-height="false" fo:min-height="0.895cm" fo:min-width="0cm" fo:padding-top="0.125cm" fo:padding-bottom="0.125cm" fo:padding-left="0.25cm" fo:padding-right="0.25cm" fo:wrap-option="wrap"/>
    </style:style>
    <style:style style:name="gr18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dash" draw:stroke-dash="Dashed_20__28_var_29__20_1" svg:stroke-width="0.115cm" svg:stroke-color="#595959" draw:marker-end="msArrowEnd_20_5" draw:marker-end-width="0.34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0.789cm" fo:min-width="6.588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5.023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106cm" svg:stroke-color="#e46c0a" draw:fill="solid" draw:fill-color="#f79646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106cm" svg:stroke-color="#002060" draw:marker-start="Rounded_20_short_20_Arrow" draw:marker-start-width="0.371cm" draw:marker-start-center="false" draw:marker-end="Rounded_20_short_20_Arrow" draw:marker-end-width="0.371cm" draw:marker-end-center="false" draw:fill="none" draw:textarea-vertical-align="top" draw:auto-grow-height="false" fo:min-height="4.55cm" fo:min-width="0.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5" style:family="graphic" style:parent-style-name="standard">
      <style:graphic-properties draw:stroke="solid" svg:stroke-width="0.035cm" svg:stroke-color="#984807" draw:marker-start="msArrowEnd_20_5" draw:marker-start-width="0.21cm" draw:marker-start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0.687cm" fo:min-width="8.689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.95cm" fo:min-width="5.5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141cm" svg:stroke-color="#660066" draw:marker-start="Rounded_20_short_20_Arrow" draw:marker-start-width="0.423cm" draw:marker-start-center="false" draw:marker-end="" draw:marker-end-width="0.423cm" draw:marker-end-center="false" draw:fill="none" draw:textarea-vertical-align="top" draw:auto-grow-height="false" fo:min-height="5.513cm" fo:min-width="0cm" fo:padding-top="0.125cm" fo:padding-bottom="0.125cm" fo:padding-left="0.25cm" fo:padding-right="0.25cm" fo:wrap-option="wrap"/>
    </style:style>
    <style:style style:name="gr29" style:family="graphic">
      <style:graphic-properties style:protect="size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3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notes">
      <style:graphic-properties draw:fill-color="#ffffff" fo:min-height="13.364cm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4" style:family="presentation" style:parent-style-name="Titel_20_und_20_Inhal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00b05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solid" draw:fill-color="#0070c0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b9cde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solid" draw:fill-color="#eefc6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b9cde5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3" style:family="paragraph">
      <loext:graphic-properties draw:fill="solid" draw:fill-color="#f79646"/>
      <style:paragraph-properties fo:text-align="start" style:font-independent-line-spacing="true"/>
      <style:text-properties fo:font-size="18pt"/>
    </style:style>
    <style:style style:name="P14" style:family="paragraph">
      <loext:graphic-properties draw:fill-color="#ffffff"/>
    </style:style>
    <style:style style:name="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text-indent="0cm" style:writing-mode="lr-tb"/>
    </style:style>
    <style:style style:name="P21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18pt" style:font-size-asian="11pt" style:font-size-complex="11pt"/>
    </style:style>
    <style:style style:name="P2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eeece1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206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206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Abgerundetes Rechteck 7" draw:style-name="gr1" draw:text-style-name="P2" draw:layer="layout" svg:width="10.014cm" svg:height="13.839cm" svg:x="1.045cm" svg:y="0.838cm">
          <text:p text:style-name="P1"><text:span text:style-name="T1">Windows/Linux/RPI/MacO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7" draw:style-name="gr2" draw:text-style-name="P3" draw:layer="layout" svg:width="10.126cm" svg:height="13.753cm" svg:x="14.175cm" svg:y="0.924cm">
          <text:p text:style-name="P1"><text:span text:style-name="T2">Browser (PC/Smartphone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3" draw:text-style-name="P4" draw:layer="layout" svg:width="7.489cm" svg:height="1.437cm" svg:x="3.2cm" svg:y="3.934cm">
          <text:p text:style-name="P1"><text:span text:style-name="T3">www-backend-daemon</text:span></text:p>
          <text:p text:style-name="P1"><text:span text:style-name="T3">(nodejs swagger www/server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4" draw:style-name="gr4" draw:text-style-name="P5" draw:layer="layout" svg:width="9.216cm" svg:height="6.525cm" svg:x="1.435cm" svg:y="7.8cm">
          <text:p text:style-name="P1"><text:span text:style-name="T4">piano-daem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5" draw:text-style-name="P6" draw:layer="layout" svg:width="3.253cm" svg:height="0.001cm" svg:x="1.053cm" svg:y="17.2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3" draw:style-name="gr6" draw:text-style-name="P8" draw:layer="layout" svg:width="5.778cm" svg:height="0.843cm" svg:x="4.237cm" svg:y="16.8cm">
          <text:p text:style-name="P7"><text:span text:style-name="T5">HTTP Port 8080 (REST AP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44" draw:style-name="gr7" draw:text-style-name="P6" draw:layer="layout" svg:width="3.253cm" svg:height="0.001cm" svg:x="1.045cm" svg:y="17.9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5" draw:style-name="gr6" draw:text-style-name="P8" draw:layer="layout" svg:width="5.481cm" svg:height="0.843cm" svg:x="4.234cm" svg:y="17.388cm">
          <text:p text:style-name="P7"><text:span text:style-name="T5">HTTP Port 80 (Javascrip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4" draw:style-name="gr8" draw:text-style-name="P9" draw:layer="layout" svg:width="3.706cm" svg:height="0.983cm" svg:x="20.575cm" svg:y="17.142cm">
          <text:p text:style-name="P1"><text:span text:style-name="T3">Pyth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3.722cm" svg:height="0.926cm" svg:x="20.575cm" svg:y="15.884cm">
          <text:p text:style-name="P1"><text:span text:style-name="T3">Javascrip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4" draw:style-name="gr10" draw:text-style-name="P11" draw:layer="layout" svg:width="8.4cm" svg:height="1.451cm" svg:x="1.8cm" svg:y="9.4cm">
          <text:p text:style-name="P1"><text:span text:style-name="T3">WebsocketServ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9.296cm" svg:height="11.748cm" svg:x="14.631cm" svg:y="2.577cm">
          <text:p text:style-name="P1"><text:span text:style-name="T3">www/cli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5.752cm" svg:height="1.488cm" svg:x="4.899cm" svg:y="5.911cm">
          <text:p text:style-name="P1"><text:span text:style-name="T3">www-frontend-daemon</text:span></text:p>
          <text:p text:style-name="P1"><text:span text:style-name="T3">(nodejs react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32" draw:style-name="gr5" draw:text-style-name="P6" draw:layer="layout" svg:width="4.057cm" svg:height="0.001cm" svg:x="10.69cm" svg:y="4.6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1" draw:text-style-name="P6" draw:layer="layout" svg:width="3.979cm" svg:height="1.052cm" svg:x="10.652cm" svg:y="5.5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2" draw:text-style-name="P6" draw:layer="layout" svg:width="3.253cm" svg:height="0.001cm" svg:x="1.053cm" svg:y="16.4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3" draw:style-name="gr6" draw:text-style-name="P8" draw:layer="layout" svg:width="10.748cm" svg:height="0.843cm" svg:x="4.252cm" svg:y="15.957cm">
          <text:p text:style-name="P7"><text:span text:style-name="T5">Piano-daemon Websocket Port 1770 (* Beethove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4" draw:style-name="gr8" draw:text-style-name="P9" draw:layer="layout" svg:width="7.122cm" svg:height="0.983cm" svg:x="2cm" svg:y="12cm">
          <text:p text:style-name="P1"><text:span text:style-name="T3">PianoPlay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7cm" svg:y="4.372cm">
          <text:p text:style-name="P1"><text:span text:style-name="T3">Keyboard compon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7cm" svg:y="5.982cm">
          <text:p text:style-name="P1"><text:span text:style-name="T3">Dashboard compon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7cm" svg:y="7.552cm">
          <text:p text:style-name="P1"><text:span text:style-name="T3">Setting slider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679cm" svg:y="9.106cm">
          <text:p text:style-name="P1"><text:span text:style-name="T3">Progress ba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13" draw:text-style-name="P6" draw:layer="layout" svg:width="5.877cm" svg:height="3.876cm" svg:x="9.8cm" svg:y="5.5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4" draw:text-style-name="P6" draw:layer="layout" svg:width="5.5cm" svg:height="3.122cm" svg:x="10.2cm" svg:y="6.55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5" draw:text-style-name="P6" draw:layer="layout" svg:width="5.5cm" svg:height="1.872cm" svg:x="10.2cm" svg:y="8.1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6" draw:text-style-name="P6" draw:layer="layout" svg:width="5.478cm" svg:height="0.719cm" svg:x="10.2cm" svg:y="9.65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4" draw:style-name="gr17" draw:text-style-name="P6" draw:layer="layout" svg:width="0.001cm" svg:height="1.145cm" svg:x="6.099cm" svg:y="10.828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89" draw:style-name="gr18" draw:text-style-name="P6" draw:layer="layout" svg:width="2.142cm" svg:height="0.952cm" svg:x="11.8cm" svg:y="12.048cm">
          <draw:image xlink:href="Pictures/1000020100000051000000247A796D7417C38852.png" xlink:type="simple" xlink:show="embed" xlink:actuate="onLoad" loext:mime-type="image/png">
            <text:p/>
          </draw:image>
        </draw:frame>
        <draw:custom-shape draw:name="Straight Arrow Connector 90" draw:style-name="gr19" draw:text-style-name="P6" draw:layer="layout" svg:width="2.544cm" svg:height="0.012cm" svg:x="9.256cm" svg:y="12.58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itle 1" draw:style-name="gr20" draw:text-style-name="P12" draw:layer="layout" svg:width="7.136cm" svg:height="1.751cm" svg:x="10.725cm" svg:y="16.869cm">
          <text:p text:style-name="P1"><text:span text:style-name="T6">Depin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8" draw:style-name="gr21" draw:text-style-name="P4" draw:layer="layout" svg:width="7.2cm" svg:height="1.151cm" svg:x="15.7cm" svg:y="10.661cm">
          <text:p text:style-name="P1"><text:span text:style-name="T3">Overla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22" draw:text-style-name="P6" draw:layer="layout" svg:width="5.523cm" svg:height="0.001cm" svg:x="10.2cm" svg:y="10.8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bgerundetes Rechteck 8" draw:style-name="gr23" draw:text-style-name="P13" draw:layer="layout" svg:width="1.973cm" svg:height="1.535cm" svg:x="2.623cm" svg:y="5.865cm">
          <text:p text:style-name="P1"><text:span text:style-name="T3">Sqlite</text:span><text:span text:style-name="T3"><text:line-break/></text:span><text:span text:style-name="T3">DB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nector: Elbow 4" draw:style-name="gr24" draw:text-style-name="P6" draw:layer="layout" svg:width="0.8cm" svg:height="4.8cm" draw:transform="rotate (-3.14159265358979) translate (3.2cm 9.4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rade Verbindung mit Pfeil 41" draw:style-name="gr25" draw:text-style-name="P6" draw:layer="layout" svg:width="0.001cm" svg:height="0.491cm" svg:x="3.61cm" svg:y="5.3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bgerundetes Rechteck 8" draw:style-name="gr26" draw:text-style-name="P4" draw:layer="layout" svg:width="9.289cm" svg:height="1.037cm" svg:x="1.4cm" svg:y="2.6cm">
          <text:p text:style-name="P1"><text:span text:style-name="T3">Electron Ap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21" draw:text-style-name="P4" draw:layer="layout" svg:width="7.2cm" svg:height="1.151cm" svg:x="15.6cm" svg:y="12.2cm">
          <text:p text:style-name="P1"><text:span text:style-name="T3">Ap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27" draw:text-style-name="P6" draw:layer="layout" svg:width="6cm" svg:height="1.2cm" svg:x="9.6cm" svg:y="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28" draw:text-style-name="P6" draw:layer="layout" svg:width="0.053cm" svg:height="5.763cm" svg:x="2cm" svg:y="3.616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29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ebsocket API" draw:style-name="dp1" draw:master-page-name="Titel_20_und_20_Inhalt" presentation:presentation-page-layout-name="AL2T11">
        <draw:frame draw:name="Title 1" presentation:style-name="pr2" draw:text-style-name="P12" draw:layer="layout" svg:width="22.859cm" svg:height="0.56cm" svg:x="1.27cm" svg:y="0.763cm" presentation:class="title" presentation:user-transformed="true">
          <draw:text-box>
            <text:p text:style-name="P15"><text:span text:style-name="T7">Piano Daemon Websocket API</text:span></text:p>
          </draw:text-box>
        </draw:frame>
        <draw:frame draw:name="Content Placeholder 2" presentation:style-name="pr3" draw:text-style-name="P21" draw:layer="layout" svg:width="12.573cm" svg:height="15.962cm" svg:x="1.27cm" svg:y="2.357cm" presentation:class="outline" presentation:user-transformed="true">
          <draw:text-box>
            <text:list text:style-name="L2">
              <text:list-item>
                <text:p text:style-name="P16"><text:span text:style-name="T8">Commands (Client -&gt; Server)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9">KeyboardComman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5">note</text:span></text:p>
                      </text:list-item>
                      <text:list-item>
                        <text:p text:style-name="P18"><text:span text:style-name="T5">velocity</text:span></text:p>
                      </text:list-item>
                    </text:list>
                  </text:list-item>
                  <text:list-item>
                    <text:p text:style-name="P17"><text:span text:style-name="T9">ControlCommand</text:span></text:p>
                    <text:list>
                      <text:list-item>
                        <text:p text:style-name="P18"><text:span text:style-name="T5">play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8"><text:span text:style-name="T5">play_startup_jingle</text:span></text:p>
                      </text:list-item>
                      <text:list-item>
                        <text:p text:style-name="P18"><text:span text:style-name="T5">pause</text:span></text:p>
                      </text:list-item>
                      <text:list-item>
                        <text:p text:style-name="P18"><text:span text:style-name="T5">stop</text:span></text:p>
                      </text:list-item>
                      <text:list-item>
                        <text:p text:style-name="P18"><text:span text:style-name="T5">shutdown</text:span></text:p>
                      </text:list-item>
                      <text:list-item>
                        <text:p text:style-name="P18"><text:span text:style-name="T5">tempo</text:span></text:p>
                        <text:list>
                          <text:list-item>
                            <text:p text:style-name="P19"><text:span text:style-name="T10">value</text:span></text:p>
                          </text:list-item>
                        </text:list>
                      </text:list-item>
                      <text:list-item>
                        <text:p text:style-name="P18"><text:span text:style-name="T5">dynamics</text:span></text:p>
                        <text:list>
                          <text:list-item>
                            <text:p text:style-name="P19"><text:span text:style-name="T10">value</text:span></text:p>
                          </text:list-item>
                        </text:list>
                      </text:list-item>
                      <text:list-item>
                        <text:p text:style-name="P18"><text:span text:style-name="T5">transposition</text:span></text:p>
                        <text:list>
                          <text:list-item>
                            <text:p text:style-name="P19"><text:span text:style-name="T10">value</text:span></text:p>
                          </text:list-item>
                        </text:list>
                      </text:list-item>
                      <text:list-item>
                        <text:p text:style-name="P20"><text:span text:style-name="T5">selectedMidiOutPort</text:span></text:p>
                        <text:list>
                          <text:list-item>
                            <text:p text:style-name="P19"><text:span text:style-name="T10">valu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0"><text:span text:style-name="T9">RpcComman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5">int CalculatePlayDuration(mididata)</text:span></text:p>
                      </text:list-item>
                      <text:list-item>
                        <text:p text:style-name="P20"><text:span text:style-name="T5">void PlayComposition(name, composer, duration, mididata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Content Placeholder 2" draw:style-name="gr30" draw:text-style-name="P22" draw:layer="layout" svg:width="10.229cm" svg:height="15.995cm" svg:x="13.843cm" svg:y="2.324cm">
          <text:list text:style-name="L7">
            <text:list-item>
              <text:p text:style-name="P16"><text:span text:style-name="T8">Messages (Server -&gt; Client)</text:span></text:p>
            </text:list-item>
          </text:list>
          <text:list text:style-name="L8">
            <text:list-item>
              <text:list>
                <text:list-item>
                  <text:p text:style-name="P17"><text:span text:style-name="T9">InfoMessage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18"><text:span text:style-name="T5">composition</text:span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9"><text:span text:style-name="T10">name</text:span></text:p>
                        </text:list-item>
                        <text:list-item>
                          <text:p text:style-name="P19"><text:span text:style-name="T10">composerName</text:span></text:p>
                        </text:list-item>
                        <text:list-item>
                          <text:p text:style-name="P19"><text:span text:style-name="T10">duration</text:span></text:p>
                        </text:list-item>
                        <text:list-item>
                          <text:p text:style-name="P19"><text:span text:style-name="T10">playTime</text:span></text:p>
                        </text:list-item>
                      </text:list>
                    </text:list-item>
                    <text:list-item>
                      <text:p text:style-name="P18"><text:span text:style-name="T5">tempo</text:span></text:p>
                    </text:list-item>
                    <text:list-item>
                      <text:p text:style-name="P18"><text:span text:style-name="T5">dynamics</text:span></text:p>
                    </text:list-item>
                    <text:list-item>
                      <text:p text:style-name="P18"><text:span text:style-name="T5">transposition</text:span></text:p>
                    </text:list-item>
                    <text:list-item>
                      <text:p text:style-name="P18"><text:span text:style-name="T5">isPlayable</text:span></text:p>
                    </text:list-item>
                    <text:list-item>
                      <text:p text:style-name="P18"><text:span text:style-name="T5">isPauseable</text:span></text:p>
                    </text:list-item>
                    <text:list-item>
                      <text:p text:style-name="P18"><text:span text:style-name="T5">isStoppable</text:span></text:p>
                    </text:list-item>
                    <text:list-item>
                      <text:p text:style-name="P18"><text:span text:style-name="T5">wasCancelled</text:span></text:p>
                    </text:list-item>
                    <text:list-item>
                      <text:p text:style-name="P18"><text:span text:style-name="T5">availableMidiOutPorts</text:span></text:p>
                    </text:list-item>
                    <text:list-item>
                      <text:p text:style-name="P18"><text:span text:style-name="T5">selectedMidiOutPort</text:span></text:p>
                    </text:list-item>
                  </text:list>
                </text:list-item>
                <text:list-item>
                  <text:p text:style-name="P17"><text:span text:style-name="T9">KeyboardMessage</text:span></text:p>
                  <text:list>
                    <text:list-item>
                      <text:p text:style-name="P18"><text:span text:style-name="T5">note</text:span></text:p>
                    </text:list-item>
                    <text:list-item>
                      <text:p text:style-name="P18"><text:span text:style-name="T5">velocity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9" draw:layer="layout" svg:width="19.798cm" svg:height="11.136cm" svg:x="0.6cm" svg:y="2.257cm" draw:page-number="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draw:frame draw:name="Title 1" presentation:style-name="pr2" draw:text-style-name="P12" draw:layer="layout" svg:width="22.859cm" svg:height="0.56cm" svg:x="1.271cm" svg:y="0.786cm" presentation:class="title" presentation:user-transformed="true">
          <draw:text-box>
            <text:p text:style-name="P15"><text:span text:style-name="T7">Git Release-Branch-Process</text:span></text:p>
          </draw:text-box>
        </draw:frame>
        <draw:frame draw:style-name="gr31" draw:text-style-name="P23" draw:layer="layout" svg:width="23.706cm" svg:height="12.4cm" svg:x="0.8cm" svg:y="3.4cm">
          <draw:image xlink:href="Pictures/100002010000048E00000262D8B2E9588D15E691.png" xlink:type="simple" xlink:show="embed" xlink:actuate="onLoad" loext:mime-type="image/png">
            <text:p/>
          </draw:image>
        </draw:frame>
        <presentation:notes draw:style-name="dp2">
          <draw:page-thumbnail draw:style-name="gr29" draw:layer="layout" svg:width="14.848cm" svg:height="11.136cm" svg:x="3.075cm" svg:y="2.257cm" draw:page-number="3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stroke-dash draw:name="Dashed_20__28_var_29__20_1" draw:display-name="Dashed (var) 1" draw:style="rect" draw:dots2="1" draw:dots2-length="0.345cm" draw:distance="0.11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5-09-28">28.09.25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2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Inhaltsplatzhalt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Textmasterformat bearbeiten</text:span></text:p>
              <text:list>
                <text:list-item>
                  <text:p text:style-name="MP11"><text:span text:style-name="MT5">Zweite Ebene</text:span></text:p>
                  <text:list>
                    <text:list-item>
                      <text:p text:style-name="MP12"><text:span text:style-name="MT6">Dritte Ebene</text:span></text:p>
                      <text:list>
                        <text:list-item>
                          <text:p text:style-name="MP13"><text:span text:style-name="MT7">Vierte Ebene</text:span></text:p>
                          <text:list>
                            <text:list-item>
                              <text:p text:style-name="MP13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5-09-28">28.09.25</text:date></text:span></text:p>
        </draw:text-box>
      </draw:frame>
      <draw:frame draw:name="Fußzeilenplatzhalt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2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owerPoint-Präsentation</dc:title>
    <meta:initial-creator>Huffschmid, Norbert</meta:initial-creator>
    <meta:editing-cycles>26</meta:editing-cycles>
    <meta:creation-date>2017-10-20T10:16:41</meta:creation-date>
    <dc:date>2025-09-28T11:49:36.283000000</dc:date>
    <meta:editing-duration>PT19H40M58S</meta:editing-duration>
    <meta:generator>LibreOffice/6.3.1.2$Windows_X86_64 LibreOffice_project/b79626edf0065ac373bd1df5c28bd630b4424273</meta:generator>
    <meta:document-statistic meta:object-count="82"/>
    <meta:user-defined meta:name="AppVersion">16.0000</meta:user-defined>
    <meta:user-defined meta:name="Company">EOS - Electro Optical System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
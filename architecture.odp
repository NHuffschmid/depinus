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08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59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record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In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  <text:list-item>
                        <text:p text:style-name="P21"><text:span text:style-name="T5">object GetCurrentMidiData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  <text:list-item>
                          <text:p text:style-name="P19"><text:span text:style-name="T14">forwardable</text:span></text:p>
                        </text:list-item>
                        <text:list-item>
                          <text:p text:style-name="P19"><text:span text:style-name="T14">backwardabl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isWaiting</text:span></text:p>
                    </text:list-item>
                    <text:list-item>
                      <text:p text:style-name="P18"><text:span text:style-name="T13">isRecordable</text:span></text:p>
                    </text:list-item>
                    <text:list-item>
                      <text:p text:style-name="P18"><text:span text:style-name="T13">isRecording</text:span></text:p>
                    </text:list-item>
                    <text:list-item>
                      <text:p text:style-name="P18"><text:span text:style-name="T13">recordingSaved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  <text:list-item>
                      <text:p text:style-name="P18"><text:span text:style-name="T13">availableMidiInPorts</text:span></text:p>
                    </text:list-item>
                    <text:list-item>
                      <text:p text:style-name="P18"><text:span text:style-name="T13">selectedMidiInPort</text:span></text:p>
                    </text:list-item>
                    <text:list-item>
                      <text:p text:style-name="P18"><text:span text:style-name="T13">midiEventBytes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/text:p>
                    </text:list-item>
                    <text:list-item>
                      <text:p text:style-name="P18"><text:span text:style-name="T13">playTime (optional)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3-15">15.03.26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3-15">15.03.26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46</meta:editing-cycles>
    <meta:creation-date>2017-10-20T10:16:41</meta:creation-date>
    <dc:date>2026-03-15T11:35:34.025000000</dc:date>
    <meta:editing-duration>PT22H1M24S</meta:editing-duration>
    <meta:generator>LibreOffice/6.3.1.2$Windows_X86_64 LibreOffice_project/b79626edf0065ac373bd1df5c28bd630b4424273</meta:generator>
    <meta:document-statistic meta:object-count="78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
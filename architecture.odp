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51000000247A796D7417C3885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Calibri" svg:font-family="Calibri"/>
    <style:font-face style:name="Calibri1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106cm" svg:stroke-color="#4f6228" draw:fill="solid" draw:fill-color="#00b050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solid" svg:stroke-width="0.106cm" svg:stroke-color="#0070c0" draw:fill="solid" draw:fill-color="#0070c0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solid" svg:stroke-width="0.106cm" svg:stroke-color="#376092" draw:fill="solid" draw:fill-color="#b9cde5" draw:textarea-vertical-align="top" draw:auto-grow-height="false" draw:fit-to-size="false" style:shrink-to-fit="false" fo:min-height="1.047cm" fo:min-width="6.849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106cm" svg:stroke-color="#e46c0a" draw:fill="solid" draw:fill-color="#eefc64" draw:textarea-vertical-align="top" draw:auto-grow-height="false" draw:fit-to-size="false" style:shrink-to-fit="false" fo:min-height="5.639cm" fo:min-width="8.08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141cm" svg:stroke-color="#ff0000" draw:marker-start="msArrowEnd_20_5" draw:marker-start-width="0.423cm" draw:marker-start-center="false" draw:marker-end="msArrowEnd_20_5" draw:marker-end-width="0.423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7" style:family="graphic" style:parent-style-name="standard">
      <style:graphic-properties draw:stroke="solid" svg:stroke-width="0.141cm" svg:stroke-color="#d99694" draw:marker-start="msArrowEnd_20_5" draw:marker-start-width="0.423cm" draw:marker-start-center="false" draw:marker-end="msArrowEnd_20_5" draw:marker-end-width="0.423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106cm" svg:stroke-color="#e46c0a" draw:fill="solid" draw:fill-color="#ffff00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106cm" svg:stroke-color="#376092" draw:fill="solid" draw:fill-color="#b9cde5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106cm" svg:stroke-color="#e46c0a" draw:fill="solid" draw:fill-color="#ffff00" draw:textarea-vertical-align="top" draw:auto-grow-height="false" draw:fit-to-size="false" style:shrink-to-fit="false" fo:min-height="1.061cm" fo:min-width="7.76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141cm" svg:stroke-color="#d99694" draw:marker-end="msArrowEnd_20_5" draw:marker-end-width="0.423cm" draw:marker-end-center="false" draw:fill="none" draw:textarea-vertical-align="top" draw:auto-grow-height="false" fo:min-height="0.802cm" fo:min-width="3.479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141cm" svg:stroke-color="#660066" draw:marker-start="msArrowEnd_20_5" draw:marker-start-width="0.423cm" draw:marker-start-center="false" draw:marker-end="msArrowEnd_20_5" draw:marker-end-width="0.423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141cm" svg:stroke-color="#660066" draw:marker-start="msArrowEnd_20_5" draw:marker-start-width="0.423cm" draw:marker-start-center="false" draw:marker-end="msArrowEnd_20_5" draw:marker-end-width="0.423cm" draw:marker-end-center="false" draw:fill="none" draw:textarea-vertical-align="top" draw:auto-grow-height="false" fo:min-height="3.626cm" fo:min-width="5.377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.141cm" svg:stroke-color="#660066" draw:marker-start="msArrowEnd_20_5" draw:marker-start-width="0.423cm" draw:marker-start-center="false" draw:marker-end="msArrowEnd_20_5" draw:marker-end-width="0.423cm" draw:marker-end-center="false" draw:fill="none" draw:textarea-vertical-align="top" draw:auto-grow-height="false" fo:min-height="2.872cm" fo:min-width="5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solid" svg:stroke-width="0.141cm" svg:stroke-color="#660066" draw:marker-start="msArrowEnd_20_5" draw:marker-start-width="0.423cm" draw:marker-start-center="false" draw:marker-end="msArrowEnd_20_5" draw:marker-end-width="0.423cm" draw:marker-end-center="false" draw:fill="none" draw:textarea-vertical-align="top" draw:auto-grow-height="false" fo:min-height="1.622cm" fo:min-width="5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solid" svg:stroke-width="0.141cm" svg:stroke-color="#660066" draw:marker-start="msArrowEnd_20_5" draw:marker-start-width="0.423cm" draw:marker-start-center="false" draw:marker-end="msArrowEnd_20_5" draw:marker-end-width="0.423cm" draw:marker-end-center="false" draw:fill="none" draw:textarea-vertical-align="top" draw:auto-grow-height="false" fo:min-height="0.469cm" fo:min-width="4.978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solid" svg:stroke-width="0.115cm" svg:stroke-color="#595959" draw:marker-end="msArrowEnd_20_5" draw:marker-end-width="0.345cm" draw:marker-end-center="false" draw:fill="none" draw:textarea-vertical-align="top" draw:auto-grow-height="false" fo:min-height="0.895cm" fo:min-width="0cm" fo:padding-top="0.125cm" fo:padding-bottom="0.125cm" fo:padding-left="0.25cm" fo:padding-right="0.25cm" fo:wrap-option="wrap"/>
    </style:style>
    <style:style style:name="gr18" style:family="graphic" style:parent-style-name="Objekt_20_ohne_20_Füllung_20_und_20_Lini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stroke="dash" draw:stroke-dash="Dashed_20__28_var_29__20_1" svg:stroke-width="0.115cm" svg:stroke-color="#595959" draw:marker-end="msArrowEnd_20_5" draw:marker-end-width="0.345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none" svg:stroke-width="0cm" draw:fill="none" draw:textarea-vertical-align="middle" draw:auto-grow-height="false" draw:fit-to-size="shrink-to-fit" style:shrink-to-fit="true" fo:min-height="0cm" fo:min-width="0cm" fo:padding-top="0.127cm" fo:padding-bottom="0.127cm" fo:padding-left="0.254cm" fo:padding-right="0.254cm" fo:wrap-option="wrap"/>
    </style:style>
    <style:style style:name="gr21" style:family="graphic" style:parent-style-name="standard">
      <style:graphic-properties draw:stroke="solid" svg:stroke-width="0.106cm" svg:stroke-color="#376092" draw:fill="solid" draw:fill-color="#b9cde5" draw:textarea-vertical-align="top" draw:auto-grow-height="false" draw:fit-to-size="false" style:shrink-to-fit="false" fo:min-height="0.789cm" fo:min-width="6.588cm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solid" svg:stroke-width="0.141cm" svg:stroke-color="#660066" draw:marker-start="msArrowEnd_20_5" draw:marker-start-width="0.423cm" draw:marker-start-center="false" draw:marker-end="msArrowEnd_20_5" draw:marker-end-width="0.423cm" draw:marker-end-center="false" draw:fill="none" draw:textarea-vertical-align="top" draw:auto-grow-height="false" fo:min-height="0cm" fo:min-width="5.023cm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solid" svg:stroke-width="0.106cm" svg:stroke-color="#e46c0a" draw:fill="solid" draw:fill-color="#f79646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solid" svg:stroke-width="0.106cm" svg:stroke-color="#660066" draw:marker-start="Rounded_20_short_20_Arrow" draw:marker-start-width="0.371cm" draw:marker-start-center="false" draw:marker-end="Rounded_20_short_20_Arrow" draw:marker-end-width="0.371cm" draw:marker-end-center="false" draw:fill="none" draw:textarea-vertical-align="top" draw:auto-grow-height="false" fo:min-height="4.55cm" fo:min-width="0.3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25" style:family="graphic" style:parent-style-name="standard">
      <style:graphic-properties draw:stroke="solid" svg:stroke-width="0.035cm" svg:stroke-color="#984807" draw:marker-start="msArrowEnd_20_5" draw:marker-start-width="0.21cm" draw:marker-start-center="false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6" style:family="graphic" style:parent-style-name="standard">
      <style:graphic-properties draw:stroke="solid" svg:stroke-width="0.106cm" svg:stroke-color="#376092" draw:fill="solid" draw:fill-color="#b9cde5" draw:textarea-vertical-align="top" draw:auto-grow-height="false" draw:fit-to-size="false" style:shrink-to-fit="false" fo:min-height="0.687cm" fo:min-width="8.689cm" fo:padding-top="0.125cm" fo:padding-bottom="0.125cm" fo:padding-left="0.25cm" fo:padding-right="0.25cm" fo:wrap-option="wrap"/>
    </style:style>
    <style:style style:name="gr27" style:family="graphic" style:parent-style-name="standard">
      <style:graphic-properties draw:stroke="solid" svg:stroke-width="0.141cm" svg:stroke-color="#660066" draw:marker-start="msArrowEnd_20_5" draw:marker-start-width="0.423cm" draw:marker-start-center="false" draw:marker-end="msArrowEnd_20_5" draw:marker-end-width="0.423cm" draw:marker-end-center="false" draw:fill="none" draw:textarea-vertical-align="top" draw:auto-grow-height="false" fo:min-height="0.95cm" fo:min-width="5.5cm" fo:padding-top="0.125cm" fo:padding-bottom="0.125cm" fo:padding-left="0.25cm" fo:padding-right="0.25cm" fo:wrap-option="wrap"/>
    </style:style>
    <style:style style:name="gr28" style:family="graphic" style:parent-style-name="standard">
      <style:graphic-properties draw:stroke="solid" svg:stroke-width="0.141cm" svg:stroke-color="#660066" draw:marker-start="Rounded_20_short_20_Arrow" draw:marker-start-width="0.423cm" draw:marker-start-center="false" draw:marker-end="" draw:marker-end-width="0.423cm" draw:marker-end-center="false" draw:fill="none" draw:textarea-vertical-align="top" draw:auto-grow-height="false" fo:min-height="5.513cm" fo:min-width="0cm" fo:padding-top="0.125cm" fo:padding-bottom="0.125cm" fo:padding-left="0.25cm" fo:padding-right="0.25cm" fo:wrap-option="wrap"/>
    </style:style>
    <style:style style:name="gr29" style:family="graphic">
      <style:graphic-properties style:protect="size"/>
    </style:style>
    <style:style style:name="gr30" style:family="graphic" style:parent-style-name="standard">
      <style:graphic-properties draw:stroke="none" svg:stroke-width="0cm" draw:fill="none" draw:textarea-vertical-align="top" draw:auto-grow-height="false" draw:fit-to-size="shrink-to-fit" style:shrink-to-fit="true" fo:min-height="0cm" fo:min-width="0cm" fo:padding-top="0.127cm" fo:padding-bottom="0.127cm" fo:padding-left="0.254cm" fo:padding-right="0.254cm" fo:wrap-option="wrap"/>
    </style:style>
    <style:style style:name="pr1" style:family="presentation" style:parent-style-name="Titelfolie-notes">
      <style:graphic-properties draw:fill-color="#ffffff" fo:min-height="13.364cm"/>
    </style:style>
    <style:style style:name="pr2" style:family="presentation" style:parent-style-name="Titel_20_und_20_Inhal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3" style:family="presentation" style:parent-style-name="Titel_20_und_20_Inhalt-outline1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pr4" style:family="presentation" style:parent-style-name="Titel_20_und_20_Inhalt-notes">
      <style:graphic-properties draw:fill-color="#ffffff" fo:min-height="13.364cm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2" style:family="paragraph">
      <loext:graphic-properties draw:fill="solid" draw:fill-color="#00b050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3" style:family="paragraph">
      <loext:graphic-properties draw:fill="solid" draw:fill-color="#0070c0"/>
      <style:paragraph-properties fo:text-align="start" style:font-independent-line-spacing="true"/>
      <style:text-properties fo:font-size="18pt"/>
    </style:style>
    <style:style style:name="P4" style:family="paragraph">
      <loext:graphic-properties draw:fill="solid" draw:fill-color="#b9cde5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5" style:family="paragraph">
      <loext:graphic-properties draw:fill="solid" draw:fill-color="#eefc64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9" style:family="paragraph">
      <loext:graphic-properties draw:fill="solid" draw:fill-color="#ffff00"/>
      <style:paragraph-properties fo:text-align="start" style:font-independent-line-spacing="true"/>
      <style:text-properties fo:font-size="18pt"/>
    </style:style>
    <style:style style:name="P10" style:family="paragraph">
      <loext:graphic-properties draw:fill="solid" draw:fill-color="#b9cde5"/>
      <style:paragraph-properties fo:text-align="start" style:font-independent-line-spacing="true"/>
      <style:text-properties fo:font-size="18pt"/>
    </style:style>
    <style:style style:name="P11" style:family="paragraph">
      <loext:graphic-properties draw:fill="solid" draw:fill-color="#ffff00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13" style:family="paragraph">
      <loext:graphic-properties draw:fill="solid" draw:fill-color="#f79646"/>
      <style:paragraph-properties fo:text-align="start" style:font-independent-line-spacing="true"/>
      <style:text-properties fo:font-size="18pt"/>
    </style:style>
    <style:style style:name="P14" style:family="paragraph">
      <loext:graphic-properties draw:fill-color="#ffffff"/>
    </style:style>
    <style:style style:name="P1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16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P17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P18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P19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P20" style:family="paragraph"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hyphenate="false"/>
    </style:style>
    <style:style style:name="P21" style:family="paragraph">
      <style:paragraph-properties fo:margin-left="0cm" fo:margin-right="0cm" fo:text-indent="0cm" style:writing-mode="lr-tb"/>
    </style:style>
    <style:style style:name="P22" style:family="paragraph">
      <loext:graphic-properties draw:fill="none"/>
      <style:paragraph-properties fo:text-align="start" style:font-independent-line-spacing="true"/>
      <style:text-properties fo:font-size="18pt" style:font-size-asian="18pt" style:font-size-complex="18pt"/>
    </style:style>
    <style:style style:name="P23" style:family="paragraph">
      <loext:graphic-properties draw:fill="none"/>
      <style:paragraph-properties fo:text-align="start" style:font-independent-line-spacing="true"/>
      <style:text-properties fo:font-size="18pt" style:font-size-asian="11pt" style:font-size-complex="11pt"/>
    </style:style>
    <style:style style:name="T1" style:family="text">
      <style:text-properties fo:font-variant="normal" fo:text-transform="none" fo:color="#ffff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" style:family="text">
      <style:text-properties fo:font-variant="normal" fo:text-transform="none" fo:color="#eeece1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font-variant="normal" fo:text-transform="none" fo:color="#002060" style:text-line-through-style="none" style:text-line-through-type="none" style:text-position="0% 100%" style:font-name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4" style:family="text">
      <style:text-properties fo:font-variant="normal" fo:text-transform="none" fo:color="#00206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text-position="0% 100%" style:font-name="Calibri" fo:font-size="18pt" fo:letter-spacing="normal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text-position="0% 100%" style:font-name="Calibri" fo:font-size="16pt" fo:letter-spacing="normal" fo:font-style="normal" fo:text-shadow="none" style:text-underline-style="none" fo:font-weight="normal" style:letter-kerning="true" style:font-name-asian="Microsoft YaHei" style:font-size-asian="16pt" style:font-style-asian="normal" style:font-weight-asian="normal" style:font-name-complex="Ari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text-position="0% 100%" style:font-name="Calibri" fo:font-size="14pt" fo:letter-spacing="normal" fo:font-style="normal" fo:text-shadow="none" style:text-underline-style="none" fo:font-weight="normal" style:letter-kerning="true" style:font-name-asian="Microsoft YaHei" style:font-size-asian="14pt" style:font-style-asian="normal" style:font-weight-asian="normal" style:font-name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0000" style:text-outline="false" style:text-line-through-style="none" style:text-line-through-type="none" style:text-position="0% 100%" style:font-name="Calibri" fo:font-size="12pt" fo:letter-spacing="normal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Arial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>
        <draw:custom-shape draw:name="Abgerundetes Rechteck 7" draw:style-name="gr1" draw:text-style-name="P2" draw:layer="layout" svg:width="10.014cm" svg:height="13.839cm" svg:x="1.045cm" svg:y="0.838cm">
          <text:p text:style-name="P1"><text:span text:style-name="T1">Windows/Linux/RPI/MacOS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Abgerundetes Rechteck 7" draw:style-name="gr2" draw:text-style-name="P3" draw:layer="layout" svg:width="10.126cm" svg:height="13.753cm" svg:x="14.175cm" svg:y="0.924cm">
          <text:p text:style-name="P1"><text:span text:style-name="T2">Browser (PC/Smartphone)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Abgerundetes Rechteck 8" draw:style-name="gr3" draw:text-style-name="P4" draw:layer="layout" svg:width="7.489cm" svg:height="1.437cm" svg:x="3.2cm" svg:y="3.934cm">
          <text:p text:style-name="P1"><text:span text:style-name="T3">www-backend-daemon</text:span></text:p>
          <text:p text:style-name="P1"><text:span text:style-name="T3">(nodejs swagger www/server)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Abgerundetes Rechteck 4" draw:style-name="gr4" draw:text-style-name="P5" draw:layer="layout" svg:width="9.216cm" svg:height="6.525cm" svg:x="1.435cm" svg:y="7.8cm">
          <text:p text:style-name="P1"><text:span text:style-name="T4">piano-daemon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erade Verbindung mit Pfeil 41" draw:style-name="gr5" draw:text-style-name="P6" draw:layer="layout" svg:width="3.253cm" svg:height="0.001cm" svg:x="1.053cm" svg:y="17.22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43" draw:style-name="gr6" draw:text-style-name="P8" draw:layer="layout" svg:width="5.778cm" svg:height="0.843cm" svg:x="4.237cm" svg:y="16.8cm">
          <text:p text:style-name="P7"><text:span text:style-name="T5">HTTP Port 8080 (REST API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44" draw:style-name="gr7" draw:text-style-name="P6" draw:layer="layout" svg:width="3.253cm" svg:height="0.001cm" svg:x="1.045cm" svg:y="17.9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45" draw:style-name="gr6" draw:text-style-name="P8" draw:layer="layout" svg:width="5.481cm" svg:height="0.843cm" svg:x="4.234cm" svg:y="17.388cm">
          <text:p text:style-name="P7"><text:span text:style-name="T5">HTTP Port 80 (Javascript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bgerundetes Rechteck 4" draw:style-name="gr8" draw:text-style-name="P9" draw:layer="layout" svg:width="3.706cm" svg:height="0.983cm" svg:x="20.575cm" svg:y="17.142cm">
          <text:p text:style-name="P1"><text:span text:style-name="T3">Python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Abgerundetes Rechteck 8" draw:style-name="gr9" draw:text-style-name="P10" draw:layer="layout" svg:width="3.722cm" svg:height="0.926cm" svg:x="20.575cm" svg:y="15.884cm">
          <text:p text:style-name="P1"><text:span text:style-name="T3">Javascript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Abgerundetes Rechteck 4" draw:style-name="gr10" draw:text-style-name="P11" draw:layer="layout" svg:width="8.4cm" svg:height="1.451cm" svg:x="1.8cm" svg:y="9.4cm">
          <text:p text:style-name="P1"><text:span text:style-name="T3">WebsocketServer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Abgerundetes Rechteck 8" draw:style-name="gr9" draw:text-style-name="P10" draw:layer="layout" svg:width="9.296cm" svg:height="11.748cm" svg:x="14.631cm" svg:y="2.577cm">
          <text:p text:style-name="P1"><text:span text:style-name="T3">www/client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Abgerundetes Rechteck 8" draw:style-name="gr9" draw:text-style-name="P10" draw:layer="layout" svg:width="5.752cm" svg:height="1.488cm" svg:x="4.899cm" svg:y="5.911cm">
          <text:p text:style-name="P1"><text:span text:style-name="T3">www-frontend-daemon</text:span></text:p>
          <text:p text:style-name="P1"><text:span text:style-name="T3">(nodejs react)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erade Verbindung mit Pfeil 32" draw:style-name="gr5" draw:text-style-name="P6" draw:layer="layout" svg:width="4.057cm" svg:height="0.001cm" svg:x="10.69cm" svg:y="4.60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44" draw:style-name="gr11" draw:text-style-name="P6" draw:layer="layout" svg:width="3.979cm" svg:height="1.052cm" svg:x="10.652cm" svg:y="5.52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41" draw:style-name="gr12" draw:text-style-name="P6" draw:layer="layout" svg:width="3.253cm" svg:height="0.001cm" svg:x="1.053cm" svg:y="16.42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43" draw:style-name="gr6" draw:text-style-name="P8" draw:layer="layout" svg:width="10.748cm" svg:height="0.843cm" svg:x="4.252cm" svg:y="15.957cm">
          <text:p text:style-name="P7"><text:span text:style-name="T5">Piano-daemon Websocket Port 1770 (* Beethoven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bgerundetes Rechteck 4" draw:style-name="gr8" draw:text-style-name="P9" draw:layer="layout" svg:width="7.122cm" svg:height="0.983cm" svg:x="2cm" svg:y="12cm">
          <text:p text:style-name="P1"><text:span text:style-name="T3">PianoPlayer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Abgerundetes Rechteck 8" draw:style-name="gr9" draw:text-style-name="P10" draw:layer="layout" svg:width="7.2cm" svg:height="1.151cm" svg:x="15.7cm" svg:y="4.372cm">
          <text:p text:style-name="P1"><text:span text:style-name="T3">Keyboard component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Abgerundetes Rechteck 8" draw:style-name="gr9" draw:text-style-name="P10" draw:layer="layout" svg:width="7.2cm" svg:height="1.151cm" svg:x="15.7cm" svg:y="5.982cm">
          <text:p text:style-name="P1"><text:span text:style-name="T3">Dashboard component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Abgerundetes Rechteck 8" draw:style-name="gr9" draw:text-style-name="P10" draw:layer="layout" svg:width="7.2cm" svg:height="1.151cm" svg:x="15.7cm" svg:y="7.552cm">
          <text:p text:style-name="P1"><text:span text:style-name="T3">Setting sliders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Abgerundetes Rechteck 8" draw:style-name="gr9" draw:text-style-name="P10" draw:layer="layout" svg:width="7.2cm" svg:height="1.151cm" svg:x="15.679cm" svg:y="9.106cm">
          <text:p text:style-name="P1"><text:span text:style-name="T3">Progress bar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erade Verbindung mit Pfeil 41" draw:style-name="gr13" draw:text-style-name="P6" draw:layer="layout" svg:width="5.877cm" svg:height="3.876cm" svg:x="9.8cm" svg:y="5.52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41" draw:style-name="gr14" draw:text-style-name="P6" draw:layer="layout" svg:width="5.5cm" svg:height="3.122cm" svg:x="10.2cm" svg:y="6.558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41" draw:style-name="gr15" draw:text-style-name="P6" draw:layer="layout" svg:width="5.5cm" svg:height="1.872cm" svg:x="10.2cm" svg:y="8.128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41" draw:style-name="gr16" draw:text-style-name="P6" draw:layer="layout" svg:width="5.478cm" svg:height="0.719cm" svg:x="10.2cm" svg:y="9.64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64" draw:style-name="gr17" draw:text-style-name="P6" draw:layer="layout" svg:width="0.001cm" svg:height="1.145cm" svg:x="6.099cm" svg:y="10.812cm">
          <text:p/>
          <draw:enhanced-geometry draw:mirror-horizontal="false" draw:mirror-vertical="true" svg:viewBox="0 0 21600 21600" draw:type="mso-spt32" draw:enhanced-path="M 0 0 L 21600 21600 N"/>
        </draw:custom-shape>
        <draw:frame draw:name="Picture 89" draw:style-name="gr18" draw:text-style-name="P6" draw:layer="layout" svg:width="2.142cm" svg:height="0.952cm" svg:x="11.8cm" svg:y="12.048cm">
          <draw:image xlink:href="Pictures/1000020100000051000000247A796D7417C38852.png" xlink:type="simple" xlink:show="embed" xlink:actuate="onLoad" loext:mime-type="image/png">
            <text:p/>
          </draw:image>
        </draw:frame>
        <draw:custom-shape draw:name="Straight Arrow Connector 90" draw:style-name="gr19" draw:text-style-name="P6" draw:layer="layout" svg:width="2.544cm" svg:height="0.012cm" svg:x="9.256cm" svg:y="12.588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Title 1" draw:style-name="gr20" draw:text-style-name="P12" draw:layer="layout" svg:width="7.136cm" svg:height="1.751cm" svg:x="10.725cm" svg:y="16.869cm">
          <text:p text:style-name="P1"><text:span text:style-name="T6">Depinu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bgerundetes Rechteck 8" draw:style-name="gr21" draw:text-style-name="P4" draw:layer="layout" svg:width="7.2cm" svg:height="1.151cm" svg:x="15.7cm" svg:y="10.661cm">
          <text:p text:style-name="P1"><text:span text:style-name="T3">Overlay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erade Verbindung mit Pfeil 41" draw:style-name="gr22" draw:text-style-name="P6" draw:layer="layout" svg:width="5.523cm" svg:height="0.001cm" svg:x="10.2cm" svg:y="10.85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Abgerundetes Rechteck 8" draw:style-name="gr23" draw:text-style-name="P13" draw:layer="layout" svg:width="1.973cm" svg:height="1.535cm" svg:x="2.623cm" svg:y="5.865cm">
          <text:p text:style-name="P1"><text:span text:style-name="T3">Sqlite</text:span><text:span text:style-name="T3"><text:line-break/></text:span><text:span text:style-name="T3">DB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onnector: Elbow 4" draw:style-name="gr24" draw:text-style-name="P6" draw:layer="layout" svg:width="0.8cm" svg:height="4.8cm" draw:transform="rotate (-3.14159265358979) translate (3.2cm 9.4cm)">
          <text:p/>
          <draw:enhanced-geometry draw:mirror-horizontal="false" draw:mirror-vertical="tru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Gerade Verbindung mit Pfeil 41" draw:style-name="gr25" draw:text-style-name="P6" draw:layer="layout" svg:width="0.001cm" svg:height="0.491cm" svg:x="3.61cm" svg:y="5.32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bgerundetes Rechteck 8" draw:style-name="gr26" draw:text-style-name="P4" draw:layer="layout" svg:width="9.289cm" svg:height="1.037cm" svg:x="1.4cm" svg:y="2.6cm">
          <text:p text:style-name="P1"><text:span text:style-name="T3">Electron App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Abgerundetes Rechteck 8" draw:style-name="gr21" draw:text-style-name="P4" draw:layer="layout" svg:width="7.2cm" svg:height="1.151cm" svg:x="15.6cm" svg:y="12.2cm">
          <text:p text:style-name="P1"><text:span text:style-name="T3">App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erade Verbindung mit Pfeil 41" draw:style-name="gr27" draw:text-style-name="P6" draw:layer="layout" svg:width="6cm" svg:height="1.2cm" svg:x="9.6cm" svg:y="1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1" draw:style-name="gr28" draw:text-style-name="P6" draw:layer="layout" svg:width="0.053cm" svg:height="5.763cm" svg:x="2cm" svg:y="3.6cm">
          <text:p/>
          <draw:enhanced-geometry draw:mirror-horizontal="false" draw:mirror-vertical="true" svg:viewBox="0 0 21600 21600" draw:type="mso-spt32" draw:enhanced-path="M 0 0 L 21600 21600 N"/>
        </draw:custom-shape>
        <presentation:notes draw:style-name="dp2">
          <draw:page-thumbnail draw:style-name="gr29" draw:layer="layout" svg:width="19.798cm" svg:height="11.136cm" svg:x="0.6cm" svg:y="2.257cm" draw:page-number="1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ebsocket API" draw:style-name="dp1" draw:master-page-name="Titel_20_und_20_Inhalt" presentation:presentation-page-layout-name="AL2T11">
        <draw:frame draw:name="Title 1" presentation:style-name="pr2" draw:text-style-name="P12" draw:layer="layout" svg:width="22.859cm" svg:height="0.56cm" svg:x="1.27cm" svg:y="0.763cm" presentation:class="title" presentation:user-transformed="true">
          <draw:text-box>
            <text:p text:style-name="P15"><text:span text:style-name="T7">Piano Daemon Websocket API</text:span></text:p>
          </draw:text-box>
        </draw:frame>
        <draw:frame draw:name="Content Placeholder 2" presentation:style-name="pr3" draw:text-style-name="P22" draw:layer="layout" svg:width="12.573cm" svg:height="15.962cm" svg:x="1.27cm" svg:y="2.357cm" presentation:class="outline" presentation:user-transformed="true">
          <draw:text-box>
            <text:list text:style-name="L2">
              <text:list-item>
                <text:p text:style-name="P16"><text:span text:style-name="T8">Commands (Client -&gt; Server)</text:span></text:p>
              </text:list-item>
            </text:list>
            <text:list text:style-name="L3">
              <text:list-item>
                <text:list>
                  <text:list-item>
                    <text:p text:style-name="P17"><text:span text:style-name="T9">KeyboardCommand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8"><text:span text:style-name="T5">note</text:span></text:p>
                      </text:list-item>
                      <text:list-item>
                        <text:p text:style-name="P18"><text:span text:style-name="T5">velocity</text:span></text:p>
                      </text:list-item>
                    </text:list>
                  </text:list-item>
                  <text:list-item>
                    <text:p text:style-name="P17"><text:span text:style-name="T9">ControlCommand</text:span></text:p>
                    <text:list>
                      <text:list-item>
                        <text:p text:style-name="P18"><text:span text:style-name="T5">play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8"><text:span text:style-name="T5">play_startup_jingle</text:span></text:p>
                      </text:list-item>
                      <text:list-item>
                        <text:p text:style-name="P18"><text:span text:style-name="T5">pause</text:span></text:p>
                      </text:list-item>
                      <text:list-item>
                        <text:p text:style-name="P18"><text:span text:style-name="T5">stop</text:span></text:p>
                      </text:list-item>
                      <text:list-item>
                        <text:p text:style-name="P18"><text:span text:style-name="T5">record</text:span></text:p>
                      </text:list-item>
                      <text:list-item>
                        <text:p text:style-name="P18"><text:span text:style-name="T5">shutdown</text:span></text:p>
                      </text:list-item>
                      <text:list-item>
                        <text:p text:style-name="P18"><text:span text:style-name="T5">tempo</text:span></text:p>
                        <text:list>
                          <text:list-item>
                            <text:p text:style-name="P19"><text:span text:style-name="T10">value</text:span></text:p>
                          </text:list-item>
                        </text:list>
                      </text:list-item>
                      <text:list-item>
                        <text:p text:style-name="P18"><text:span text:style-name="T5">dynamics</text:span></text:p>
                        <text:list>
                          <text:list-item>
                            <text:p text:style-name="P19"><text:span text:style-name="T10">value</text:span></text:p>
                          </text:list-item>
                        </text:list>
                      </text:list-item>
                      <text:list-item>
                        <text:p text:style-name="P18"><text:span text:style-name="T5">transposition</text:span></text:p>
                        <text:list>
                          <text:list-item>
                            <text:p text:style-name="P19"><text:span text:style-name="T10">value</text:span></text:p>
                          </text:list-item>
                        </text:list>
                      </text:list-item>
                      <text:list-item>
                        <text:p text:style-name="P20"><text:span text:style-name="T5">selectedMidiOutPort</text:span></text:p>
                        <text:list>
                          <text:list-item>
                            <text:p text:style-name="P21"><text:span text:style-name="T10">value</text:span></text:p>
                          </text:list-item>
                        </text:list>
                      </text:list-item>
                      <text:list-item>
                        <text:p text:style-name="P20"><text:span text:style-name="T5">selectedMidiInPort</text:span></text:p>
                        <text:list>
                          <text:list-item>
                            <text:p text:style-name="P21"><text:span text:style-name="T10">value</text:span></text:p>
                          </text:list-item>
                        </text:list>
                      </text:list-item>
                      <text:list-item>
                        <text:p text:style-name="P21"><text:span text:style-name="T5">playlist</text:span></text:p>
                        <text:list>
                          <text:list-item>
                            <text:p text:style-name="P19"><text:span text:style-name="T10">id</text:span></text:p>
                          </text:list-item>
                          <text:list-item>
                            <text:p text:style-name="P19"><text:span text:style-name="T10">shuffle</text:span></text:p>
                          </text:list-item>
                          <text:list-item>
                            <text:p text:style-name="P19"><text:span text:style-name="T10">repeatMod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21"><text:span text:style-name="T9">RpcCommand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21"><text:span text:style-name="T5">int CalculatePlayDuration(mididata)</text:span></text:p>
                      </text:list-item>
                      <text:list-item>
                        <text:p text:style-name="P21"><text:span text:style-name="T5">void PlayComposition(name, compositionId, composer, duration, mididata, playlistId)</text:span></text:p>
                      </text:list-item>
                      <text:list-item>
                        <text:p text:style-name="P21"><text:span text:style-name="T5">object GetCurrentMidiData(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name="Content Placeholder 2" draw:style-name="gr30" draw:text-style-name="P23" draw:layer="layout" svg:width="10.229cm" svg:height="15.995cm" svg:x="13.843cm" svg:y="2.324cm">
          <text:list text:style-name="L7">
            <text:list-item>
              <text:p text:style-name="P16"><text:span text:style-name="T11">Messages (Server -&gt; Client)</text:span></text:p>
            </text:list-item>
          </text:list>
          <text:list text:style-name="L8">
            <text:list-item>
              <text:list>
                <text:list-item>
                  <text:p text:style-name="P17"><text:span text:style-name="T12">InfoMessage</text:span></text:p>
                </text:list-item>
              </text:list>
            </text:list-item>
          </text:list>
          <text:list text:style-name="L9">
            <text:list-item>
              <text:list>
                <text:list-item>
                  <text:list>
                    <text:list-item>
                      <text:p text:style-name="P18"><text:span text:style-name="T13">composition</text:span></text:p>
                    </text:list-item>
                  </text:list>
                </text:list-item>
              </text:list>
            </text:list-item>
          </text:list>
          <text:list text:style-name="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9"><text:span text:style-name="T14">name</text:span></text:p>
                        </text:list-item>
                        <text:list-item>
                          <text:p text:style-name="P19"><text:span text:style-name="T14">compositionId</text:span></text:p>
                        </text:list-item>
                        <text:list-item>
                          <text:p text:style-name="P19"><text:span text:style-name="T14">composerName</text:span></text:p>
                        </text:list-item>
                        <text:list-item>
                          <text:p text:style-name="P19"><text:span text:style-name="T14">duration</text:span></text:p>
                        </text:list-item>
                        <text:list-item>
                          <text:p text:style-name="P19"><text:span text:style-name="T14">playTime</text:span></text:p>
                        </text:list-item>
                      </text:list>
                    </text:list-item>
                    <text:list-item>
                      <text:p text:style-name="P18"><text:span text:style-name="T13">playlist</text:span></text:p>
                      <text:list>
                        <text:list-item>
                          <text:p text:style-name="P19"><text:span text:style-name="T14">id</text:span></text:p>
                        </text:list-item>
                        <text:list-item>
                          <text:p text:style-name="P19"><text:span text:style-name="T14">shuffle</text:span></text:p>
                        </text:list-item>
                        <text:list-item>
                          <text:p text:style-name="P19"><text:span text:style-name="T14">repeatMode</text:span></text:p>
                        </text:list-item>
                        <text:list-item>
                          <text:p text:style-name="P19"><text:span text:style-name="T14">forwardable</text:span></text:p>
                        </text:list-item>
                        <text:list-item>
                          <text:p text:style-name="P19"><text:span text:style-name="T14">backwardable</text:span></text:p>
                        </text:list-item>
                        <text:list-item>
                          <text:p text:style-name="P19"><text:span text:style-name="T14">compositionId</text:span></text:p>
                        </text:list-item>
                      </text:list>
                    </text:list-item>
                    <text:list-item>
                      <text:p text:style-name="P18"><text:span text:style-name="T13">tempo</text:span></text:p>
                    </text:list-item>
                    <text:list-item>
                      <text:p text:style-name="P18"><text:span text:style-name="T13">dynamics</text:span></text:p>
                    </text:list-item>
                    <text:list-item>
                      <text:p text:style-name="P18"><text:span text:style-name="T13">transposition</text:span></text:p>
                    </text:list-item>
                    <text:list-item>
                      <text:p text:style-name="P18"><text:span text:style-name="T13">isPlayable</text:span></text:p>
                    </text:list-item>
                    <text:list-item>
                      <text:p text:style-name="P18"><text:span text:style-name="T13">isPauseable</text:span></text:p>
                    </text:list-item>
                    <text:list-item>
                      <text:p text:style-name="P18"><text:span text:style-name="T13">isStoppable</text:span></text:p>
                    </text:list-item>
                    <text:list-item>
                      <text:p text:style-name="P18"><text:span text:style-name="T13">isWaiting</text:span></text:p>
                    </text:list-item>
                    <text:list-item>
                      <text:p text:style-name="P18"><text:span text:style-name="T13">isRecordable</text:span></text:p>
                    </text:list-item>
                    <text:list-item>
                      <text:p text:style-name="P18"><text:span text:style-name="T13">isRecording</text:span></text:p>
                    </text:list-item>
                    <text:list-item>
                      <text:p text:style-name="P18"><text:span text:style-name="T13">recordingSaved</text:span></text:p>
                    </text:list-item>
                    <text:list-item>
                      <text:p text:style-name="P18"><text:span text:style-name="T13">wasCancelled</text:span></text:p>
                    </text:list-item>
                    <text:list-item>
                      <text:p text:style-name="P18"><text:span text:style-name="T13">availableMidiOutPorts</text:span></text:p>
                    </text:list-item>
                    <text:list-item>
                      <text:p text:style-name="P18"><text:span text:style-name="T13">selectedMidiOutPort</text:span></text:p>
                    </text:list-item>
                    <text:list-item>
                      <text:p text:style-name="P18"><text:span text:style-name="T13">availableMidiInPorts</text:span></text:p>
                    </text:list-item>
                    <text:list-item>
                      <text:p text:style-name="P18"><text:span text:style-name="T13">selectedMidiInPort</text:span></text:p>
                    </text:list-item>
                  </text:list>
                </text:list-item>
                <text:list-item>
                  <text:p text:style-name="P17"><text:span text:style-name="T12">KeyboardMessage</text:span></text:p>
                  <text:list>
                    <text:list-item>
                      <text:p text:style-name="P18"><text:span text:style-name="T13">note</text:span></text:p>
                    </text:list-item>
                    <text:list-item>
                      <text:p text:style-name="P18"><text:span text:style-name="T13">velocity</text:span><text:span text:style-name="T13"><text:line-break/></text:span><text:span text:style-name="T13"><text:line-break/></text:span><text:span text:style-name="T13"><text:line-break/></text:span><text:span text:style-name="T13"><text:line-break/></text:span><text:span text:style-name="T13"/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9" draw:layer="layout" svg:width="19.798cm" svg:height="11.136cm" svg:x="0.6cm" svg:y="2.257cm" draw:page-number="2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Calibri" svg:font-family="Calibri"/>
    <style:font-face style:name="Calibri1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marker draw:name="msArrowEnd_20_5" draw:display-name="msArrowEnd 5" svg:viewBox="0 0 300 300" svg:d="M150 0l150 300h-300z"/>
    <draw:stroke-dash draw:name="Dashed_20__28_var_29__20_1" draw:display-name="Dashed (var) 1" draw:style="rect" draw:dots2="1" draw:dots2-length="0.345cm" draw:distance="0.115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 style:shrink-to-fit="true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de" style:country-asian="DE" style:font-style-asian="normal" style:font-weight-asian="normal" style:font-name-complex="Arial" style:font-family-complex="Arial" style:font-family-generic-complex="system" style:font-pitch-complex="variable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folie-outline2" style:family="presentation" style:parent-style-name="Titelfoli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elfolie-outline3" style:family="presentation" style:parent-style-name="Titelfoli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folie-outline4" style:family="presentation" style:parent-style-name="Titelfoli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de" style:country-asian="DE" style:font-style-asian="normal" style:font-weight-asian="normal" style:font-name-complex="Arial" style:font-family-complex="Arial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de" style:country-asian="DE" style:font-style-asian="normal" style:font-weight-asian="normal" style:font-name-complex="Arial" style:font-family-complex="Arial" style:font-family-generic-complex="system" style:font-pitch-complex="variable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outline2" style:display-name="Titel und Inhalt-outline2" style:family="presentation" style:parent-style-name="Titel_20_und_20_Inhal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el_20_und_20_Inhalt-outline3" style:display-name="Titel und Inhalt-outline3" style:family="presentation" style:parent-style-name="Titel_20_und_20_Inhal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_20_und_20_Inhalt-outline4" style:display-name="Titel und Inhalt-outline4" style:family="presentation" style:parent-style-name="Titel_20_und_20_Inhal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_20_und_20_Inhalt-outline5" style:display-name="Titel und Inhalt-outline5" style:family="presentation" style:parent-style-name="Titel_20_und_20_Inhalt-outline4">
      <style:paragraph-properties fo:margin-top="0.1cm" fo:margin-bottom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de" style:country-asian="DE" style:font-style-asian="normal" style:font-weight-asian="normal" style:font-name-complex="Arial" style:font-family-complex="Arial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elfoli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Titelfoli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" style:family="presentation" style:parent-style-name="Titelfoli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elfoli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el_20_und_20_Inhal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6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el_20_und_20_Inhal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" style:family="presentation" style:parent-style-name="Titel_20_und_20_Inhalt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el_20_und_20_Inha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0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1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</text:page-number></text:span></text:p>
        </draw:text-box>
      </draw:frame>
    </style:handout-master>
    <style:master-page style:name="Titelfolie" style:page-layout-name="PM1" draw:style-name="Mdp1">
      <draw:frame draw:name="Titel 1" presentation:style-name="Mpr1" draw:text-style-name="MP6" draw:layer="backgroundobjects" svg:width="21.589cm" svg:height="4.082cm" svg:x="1.905cm" svg:y="5.918cm" presentation:class="title" presentation:user-transformed="true">
        <draw:text-box>
          <text:p text:style-name="MP5"><text:span text:style-name="MT2">Titelmasterformat durch Klicken bearbeiten</text:span></text:p>
        </draw:text-box>
      </draw:frame>
      <draw:frame draw:name="Datumsplatzhalter 3" presentation:style-name="Mpr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text:date style:data-style-name="D1" text:date-value="2026-02-05">05.02.26</text:date></text:span></text:p>
        </draw:text-box>
      </draw:frame>
      <draw:frame draw:name="Fußzeilenplatzhalter 4" presentation:style-name="Mpr2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Foliennummernplatzhalter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3"><text:page-number>2</text:page-number></text:span></text:p>
        </draw:text-box>
      </draw:frame>
      <draw:frame presentation:style-name="Titelfoli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elfolie-title" draw:layer="backgroundobjects" svg:width="19.798cm" svg:height="11.136cm" svg:x="0.6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draw:frame draw:name="Titel 1" presentation:style-name="Mpr5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2">Titelmasterformat durch Klicken bearbeiten</text:span></text:p>
        </draw:text-box>
      </draw:frame>
      <draw:frame draw:name="Inhaltsplatzhalter 2" presentation:style-name="Mpr6" draw:text-style-name="MP14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10"><text:span text:style-name="MT4">Textmasterformat bearbeiten</text:span></text:p>
              <text:list>
                <text:list-item>
                  <text:p text:style-name="MP11"><text:span text:style-name="MT5">Zweite Ebene</text:span></text:p>
                  <text:list>
                    <text:list-item>
                      <text:p text:style-name="MP12"><text:span text:style-name="MT6">Dritte Ebene</text:span></text:p>
                      <text:list>
                        <text:list-item>
                          <text:p text:style-name="MP13"><text:span text:style-name="MT7">Vierte Ebene</text:span></text:p>
                          <text:list>
                            <text:list-item>
                              <text:p text:style-name="MP13"><text:span text:style-name="MT7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text:date style:data-style-name="D1" text:date-value="2026-02-05">05.02.26</text:date></text:span></text:p>
        </draw:text-box>
      </draw:frame>
      <draw:frame draw:name="Fußzeilenplatzhalter 4" presentation:style-name="Mpr7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Foliennummernplatzhalter 5" presentation:style-name="Mpr7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3"><text:page-number>2</text:page-number></text:span></text:p>
        </draw:text-box>
      </draw:frame>
      <presentation:notes style:page-layout-name="PM0">
        <draw:page-thumbnail presentation:style-name="Titel_20_und_20_Inhalt-title" draw:layer="backgroundobjects" svg:width="14.848cm" svg:height="11.136cm" svg:x="3.075cm" svg:y="2.257cm" presentation:class="page"/>
        <draw:frame presentation:style-name="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dc:title>PowerPoint-Präsentation</dc:title>
    <meta:initial-creator>Huffschmid, Norbert</meta:initial-creator>
    <meta:editing-cycles>44</meta:editing-cycles>
    <meta:creation-date>2017-10-20T10:16:41</meta:creation-date>
    <dc:date>2026-02-05T15:22:22.476000000</dc:date>
    <meta:editing-duration>PT21H58M41S</meta:editing-duration>
    <meta:generator>LibreOffice/6.3.1.2$Windows_X86_64 LibreOffice_project/b79626edf0065ac373bd1df5c28bd630b4424273</meta:generator>
    <meta:document-statistic meta:object-count="78"/>
    <meta:user-defined meta:name="AppVersion">16.0000</meta:user-defined>
    <meta:user-defined meta:name="Company">EOS - Electro Optical Systems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</meta:user-defined>
  </office:meta>
</office:document-meta>
</file>